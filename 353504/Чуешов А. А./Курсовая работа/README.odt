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600000414672FF249.png" manifest:media-type="image/png"/>
  <manifest:file-entry manifest:full-path="Pictures/10000001000002B60000041474B69104.png" manifest:media-type="image/png"/>
  <manifest:file-entry manifest:full-path="Pictures/10000001000002B600000414ED2946D4.png" manifest:media-type="image/png"/>
  <manifest:file-entry manifest:full-path="Pictures/10000001000002B600000414A46FC1D5.png" manifest:media-type="image/png"/>
  <manifest:file-entry manifest:full-path="Pictures/10000001000002B6000004145C5D13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40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Инженерный калькулятор</text:p>
      <text:p text:style-name="Preformatted_20_Text"/>
      <text:p text:style-name="Preformatted_20_Text">Реализация проекта: Инженерный калькулятор на языке C# с использованием Windows Forms, реализующий основные математические алгоритмы.</text:p>
      <text:p text:style-name="Preformatted_20_Text"/>
      <text:p text:style-name="Preformatted_20_Text"><text:soft-page-break/><text:span text:style-name="T1">Алгоритм о</text:span>бработки ввода пользователя (используется в в методе EnterNumbers(sender,e). Применяется там же)</text:p>
      <text:p text:style-name="Preformatted_20_Text"><draw:frame draw:style-name="fr2" draw:name="Изображение1" text:anchor-type="char" svg:width="17cm" svg:height="25.573cm" draw:z-index="0"><draw:image xlink:href="Pictures/10000001000002B6000004145C5D1362.png" xlink:type="simple" xlink:show="embed" xlink:actuate="onLoad" draw:mime-type="image/png"/></draw:frame><text:soft-page-break/></text:p>
      <text:p text:style-name="Preformatted_20_Text"><text:soft-page-break/></text:p>
      <text:p text:style-name="Preformatted_20_Text">Обработка операций (используется в в методе numberOper(sender, e). Применяется там же)</text:p>
      <text:p text:style-name="Preformatted_20_Text"><draw:frame draw:style-name="fr1" draw:name="Изображение2" text:anchor-type="char" svg:width="17cm" svg:height="25.573cm" draw:z-index="1"><draw:image xlink:href="Pictures/10000001000002B600000414A46FC1D5.png" xlink:type="simple" xlink:show="embed" xlink:actuate="onLoad" draw:mime-type="image/png"/></draw:frame><text:soft-page-break/></text:p>
      <text:p text:style-name="Preformatted_20_Text"><text:soft-page-break/></text:p>
      <text:p text:style-name="Preformatted_20_Text">Алгоритм выполнения операций (используется в в методе btnEqual_Click(sender,e). Применяется там же)</text:p>
      <text:p text:style-name="Preformatted_20_Text"><draw:frame draw:style-name="fr1" draw:name="Изображение3" text:anchor-type="char" svg:width="17cm" svg:height="25.573cm" draw:z-index="2"><draw:image xlink:href="Pictures/10000001000002B60000041474B69104.png" xlink:type="simple" xlink:show="embed" xlink:actuate="onLoad" draw:mime-type="image/png"/></draw:frame><text:soft-page-break/></text:p>
      <text:p text:style-name="Preformatted_20_Text"><text:soft-page-break/></text:p>
      <text:p text:style-name="Preformatted_20_Text">Алгоритм реализации статистических функций (используется в в методах MeanAsync(data), MedianAsync(data), StandardDeviationAsync(data), VarianceAsync(data), PearsonCorrelationAsync(xs,ys). Применяется в button1_Click(sender,e))</text:p>
      <text:p text:style-name="Preformatted_20_Text"><draw:frame draw:style-name="fr1" draw:name="Изображение4" text:anchor-type="char" svg:width="17cm" svg:height="25.573cm" draw:z-index="3"><draw:image xlink:href="Pictures/10000001000002B600000414672FF249.png" xlink:type="simple" xlink:show="embed" xlink:actuate="onLoad" draw:mime-type="image/png"/></draw:frame><text:soft-page-break/></text:p>
      <text:p text:style-name="Preformatted_20_Text"><text:soft-page-break/></text:p>
      <text:p text:style-name="Preformatted_20_Text"/>
      <text:p text:style-name="Preformatted_20_Text">Алгоритм вычисления статистических функций (используется в в методе button1_Click(sender,e). Применяется там же)</text:p>
      <text:p text:style-name="Preformatted_20_Text"><draw:frame draw:style-name="fr1" draw:name="Изображение5" text:anchor-type="char" svg:width="17cm" svg:height="25.573cm" draw:z-index="4"><draw:image xlink:href="Pictures/10000001000002B600000414ED2946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22:07:39.053221338</dc:date>
    <meta:editing-duration>PT5M34S</meta:editing-duration>
    <meta:editing-cycles>1</meta:editing-cycles>
    <meta:generator>LibreOffice/7.6.4.1$Linux_X86_64 LibreOffice_project/60$Build-1</meta:generator>
    <meta:document-statistic meta:table-count="0" meta:image-count="5" meta:object-count="0" meta:page-count="11" meta:paragraph-count="7" meta:word-count="79" meta:character-count="784" meta:non-whitespace-character-count="712"/>
  </office:meta>
</office:document-meta>
</file>